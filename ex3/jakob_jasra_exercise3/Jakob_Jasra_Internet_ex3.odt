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1000001110788C8AF6A2603A4.png" manifest:media-type="image/png"/>
  <manifest:file-entry manifest:full-path="Pictures/1000000100000348000000BFB2D782B2F2AEEE07.png" manifest:media-type="image/png"/>
  <manifest:file-entry manifest:full-path="Pictures/1000000100000501000002FF5E9C7CF4F2E7832C.png" manifest:media-type="image/png"/>
  <manifest:file-entry manifest:full-path="Pictures/10000001000003A8000001DBE1E34316839B6481.png" manifest:media-type="image/png"/>
  <manifest:file-entry manifest:full-path="Pictures/100000010000031200000215816F9FC3E372CA8C.png" manifest:media-type="image/png"/>
  <manifest:file-entry manifest:full-path="Pictures/100000010000031200000215DEEE8EDD8D268D5B.png" manifest:media-type="image/png"/>
  <manifest:file-entry manifest:full-path="Pictures/100000010000031200000215903216386461945F.png" manifest:media-type="image/png"/>
  <manifest:file-entry manifest:full-path="Pictures/10000001000002C10000005698062CD7883C5678.png" manifest:media-type="image/png"/>
  <manifest:file-entry manifest:full-path="Pictures/1000000100000344000002750975C7140AECB7A6.png" manifest:media-type="image/png"/>
  <manifest:file-entry manifest:full-path="Pictures/10000001000004230000008F52701DA50AC43674.png" manifest:media-type="image/png"/>
  <manifest:file-entry manifest:full-path="Pictures/10000001000003800000025F5D2D98D0B51778ED.png" manifest:media-type="image/png"/>
  <manifest:file-entry manifest:full-path="Pictures/1000000100000398000000AA20251CC4A91F83EE.png" manifest:media-type="image/png"/>
  <manifest:file-entry manifest:full-path="Pictures/100000010000036C0000022712B113A5F7DF9B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6070" officeooo:paragraph-rsid="00126070"/>
    </style:style>
    <style:style style:name="P2" style:family="paragraph" style:parent-style-name="Header">
      <style:text-properties officeooo:rsid="00135366" officeooo:paragraph-rsid="00135366"/>
    </style:style>
    <style:style style:name="P3" style:family="paragraph" style:parent-style-name="Standard">
      <style:text-properties officeooo:rsid="00126070" officeooo:paragraph-rsid="00126070"/>
    </style:style>
    <style:style style:name="P4" style:family="paragraph" style:parent-style-name="Standard">
      <style:text-properties officeooo:rsid="00135366" officeooo:paragraph-rsid="00135366"/>
    </style:style>
    <style:style style:name="P5" style:family="paragraph" style:parent-style-name="Standard">
      <style:text-properties officeooo:rsid="0015f204" officeooo:paragraph-rsid="0015f204"/>
    </style:style>
    <style:style style:name="P6" style:family="paragraph" style:parent-style-name="Standard">
      <style:text-properties officeooo:rsid="001bdad0" officeooo:paragraph-rsid="001bdad0"/>
    </style:style>
    <style:style style:name="P7" style:family="paragraph" style:parent-style-name="Standard">
      <style:text-properties officeooo:rsid="001d0546" officeooo:paragraph-rsid="001d0546"/>
    </style:style>
    <style:style style:name="P8" style:family="paragraph" style:parent-style-name="Standard">
      <style:text-properties officeooo:rsid="002182e6" officeooo:paragraph-rsid="002182e6"/>
    </style:style>
    <style:style style:name="P9" style:family="paragraph" style:parent-style-name="Standard">
      <style:text-properties officeooo:rsid="0021a764" officeooo:paragraph-rsid="0021a764"/>
    </style:style>
    <style:style style:name="P10" style:family="paragraph" style:parent-style-name="Standard">
      <style:text-properties officeooo:rsid="0021bb4b" officeooo:paragraph-rsid="0021bb4b"/>
    </style:style>
    <style:style style:name="P11" style:family="paragraph" style:parent-style-name="Standard">
      <style:text-properties officeooo:rsid="0021bb4b" officeooo:paragraph-rsid="002969ab"/>
    </style:style>
    <style:style style:name="P12" style:family="paragraph" style:parent-style-name="Standard">
      <style:text-properties officeooo:rsid="0023724e" officeooo:paragraph-rsid="0023724e"/>
    </style:style>
    <style:style style:name="P13" style:family="paragraph" style:parent-style-name="Standard">
      <style:text-properties officeooo:rsid="0023f286" officeooo:paragraph-rsid="0023f286"/>
    </style:style>
    <style:style style:name="P14" style:family="paragraph" style:parent-style-name="Standard">
      <style:text-properties officeooo:rsid="002477c0" officeooo:paragraph-rsid="002477c0"/>
    </style:style>
    <style:style style:name="P15" style:family="paragraph" style:parent-style-name="Standard">
      <style:text-properties officeooo:rsid="00264cd1" officeooo:paragraph-rsid="00264cd1"/>
    </style:style>
    <style:style style:name="P16" style:family="paragraph" style:parent-style-name="Standard">
      <style:text-properties fo:font-size="14pt" fo:font-weight="bold" officeooo:rsid="00135366" officeooo:paragraph-rsid="00135366" style:font-size-asian="14pt" style:font-weight-asian="bold" style:font-size-complex="14pt" style:font-weight-complex="bold"/>
    </style:style>
    <style:style style:name="P17" style:family="paragraph" style:parent-style-name="Standard">
      <style:text-properties fo:font-size="14pt" fo:font-weight="bold" officeooo:rsid="00126070" officeooo:paragraph-rsid="00126070" style:font-size-asian="14pt" style:font-weight-asian="bold" style:font-size-complex="14pt" style:font-weight-complex="bold"/>
    </style:style>
    <style:style style:name="P18" style:family="paragraph" style:parent-style-name="Standard">
      <style:text-properties officeooo:rsid="0028b8e3" officeooo:paragraph-rsid="0028b8e3"/>
    </style:style>
    <style:style style:name="P19" style:family="paragraph" style:parent-style-name="Standard">
      <style:text-properties officeooo:rsid="0028b8e3" officeooo:paragraph-rsid="002969ab"/>
    </style:style>
    <style:style style:name="P20" style:family="paragraph" style:parent-style-name="Standard">
      <style:text-properties officeooo:rsid="002969ab" officeooo:paragraph-rsid="002969ab"/>
    </style:style>
    <style:style style:name="P21" style:family="paragraph" style:parent-style-name="Standard">
      <style:text-properties officeooo:rsid="0029fc54" officeooo:paragraph-rsid="0029fc54"/>
    </style:style>
    <style:style style:name="P22" style:family="paragraph" style:parent-style-name="Standard">
      <style:text-properties officeooo:rsid="002b0ff2" officeooo:paragraph-rsid="002b0ff2"/>
    </style:style>
    <style:style style:name="P23" style:family="paragraph" style:parent-style-name="Standard">
      <style:text-properties officeooo:rsid="002d2ae6" officeooo:paragraph-rsid="002d2ae6"/>
    </style:style>
    <style:style style:name="P24" style:family="paragraph" style:parent-style-name="Standard">
      <style:text-properties officeooo:paragraph-rsid="002d2ae6"/>
    </style:style>
    <style:style style:name="T1" style:family="text">
      <style:text-properties officeooo:rsid="0015f204"/>
    </style:style>
    <style:style style:name="T2" style:family="text">
      <style:text-properties officeooo:rsid="0017b3d7"/>
    </style:style>
    <style:style style:name="T3" style:family="text">
      <style:text-properties officeooo:rsid="00190ab8"/>
    </style:style>
    <style:style style:name="T4" style:family="text">
      <style:text-properties officeooo:rsid="0021bb4b"/>
    </style:style>
    <style:style style:name="T5" style:family="text">
      <style:text-properties officeooo:rsid="00226b3c"/>
    </style:style>
    <style:style style:name="T6" style:family="text">
      <style:text-properties officeooo:rsid="0023724e"/>
    </style:style>
    <style:style style:name="T7" style:family="text">
      <style:text-properties officeooo:rsid="002477c0"/>
    </style:style>
    <style:style style:name="T8" style:family="text">
      <style:text-properties officeooo:rsid="0024a1a8"/>
    </style:style>
    <style:style style:name="T9" style:family="text">
      <style:text-properties officeooo:rsid="002733e5"/>
    </style:style>
    <style:style style:name="T10" style:family="text">
      <style:text-properties officeooo:rsid="0027f820"/>
    </style:style>
    <style:style style:name="T11" style:family="text">
      <style:text-properties fo:font-size="16pt" fo:font-weight="bold" style:font-size-asian="16pt" style:font-weight-asian="bold" style:font-size-complex="16pt" style:font-weight-complex="bold"/>
    </style:style>
    <style:style style:name="T12" style:family="text">
      <style:text-properties officeooo:rsid="0028b8e3"/>
    </style:style>
    <style:style style:name="T13" style:family="text">
      <style:text-properties officeooo:rsid="002969ab"/>
    </style:style>
    <style:style style:name="T14" style:family="text">
      <style:text-properties officeooo:rsid="0029fc54"/>
    </style:style>
    <style:style style:name="T15" style:family="text">
      <style:text-properties officeooo:rsid="002b7681"/>
    </style:style>
    <style:style style:name="T16" style:family="text">
      <style:text-properties officeooo:rsid="002d2ae6"/>
    </style:style>
    <style:style style:name="T17" style:family="text">
      <style:text-properties fo:color="#569cd6" loext:opacity="100%" style:font-name="Droid Sans Mono" fo:font-size="10.5pt" fo:font-weight="normal" fo:background-color="#000000" loext:char-shading-value="0"/>
    </style:style>
    <style:style style:name="T18" style:family="text">
      <style:text-properties fo:color="#ffffff" loext:opacity="100%" style:font-name="Droid Sans Mono" fo:font-size="10.5pt" fo:font-weight="normal" fo:background-color="#000000" loext:char-shading-value="0"/>
    </style:style>
    <style:style style:name="T19" style:family="text">
      <style:text-properties fo:color="#dcdcaa" loext:opacity="100%" style:font-name="Droid Sans Mono" fo:font-size="10.5pt" fo:font-weight="normal" fo:background-color="#000000" loext:char-shading-value="0"/>
    </style:style>
    <style:style style:name="T20" style:family="text">
      <style:text-properties fo:color="#9cdcfe" loext:opacity="100%" style:font-name="Droid Sans Mono" fo:font-size="10.5pt" fo:font-weight="normal" fo:background-color="#000000"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Exercise 3</text:span></text:p>
      <text:p text:style-name="P4"/>
      <text:p text:style-name="P16">Task 1</text:p>
      <text:p text:style-name="P4"/>
      <text:p text:style-name="P1"><draw:frame draw:style-name="fr1" draw:name="Image1" text:anchor-type="char" svg:width="6.6929in" svg:height="4.2098in" draw:z-index="0"><draw:image xlink:href="Pictures/100000010000036C0000022712B113A5F7DF9BFD.png" xlink:type="simple" xlink:show="embed" xlink:actuate="onLoad" draw:mime-type="image/png"/></draw:frame></text:p>
      <text:p text:style-name="P8">The above pictures shows all the messages sent and received for the user jakob. It also shows the use and output of the show-users and show-utility commands (the last activity in show-users is still the unformated unix time).</text:p>
      <text:p text:style-name="P1"><draw:frame draw:style-name="fr1" draw:name="Image2" text:anchor-type="char" svg:width="6.6929in" svg:height="4.5339in" draw:z-index="1"><draw:image xlink:href="Pictures/10000001000003800000025F5D2D98D0B51778ED.png" xlink:type="simple" xlink:show="embed" xlink:actuate="onLoad" draw:mime-type="image/png"/></draw:frame><text:soft-page-break/></text:p>
      <text:p text:style-name="P9">Sent and received messages for user toni.</text:p>
      <text:p text:style-name="P1"/>
      <text:p text:style-name="P1"><draw:frame draw:style-name="fr1" draw:name="Image3" text:anchor-type="char" svg:width="6.6929in" svg:height="5.0354in" draw:z-index="2"><draw:image xlink:href="Pictures/1000000100000344000002750975C7140AECB7A6.png" xlink:type="simple" xlink:show="embed" xlink:actuate="onLoad" draw:mime-type="image/png"/></draw:frame><text:soft-page-break/></text:p>
      <text:p text:style-name="P9">Sent and received messages for user roger.</text:p>
      <text:p text:style-name="P1"/>
      <text:p text:style-name="P1"/>
      <text:p text:style-name="P9">Answers to questions for task 1:</text:p>
      <text:p text:style-name="P9"/>
      <text:p text:style-name="P9">a) Describe your state-based CRDT design according to its partial order, merge, and mono-</text:p>
      <text:p text:style-name="P9">tonic operations.</text:p>
      <text:p text:style-name="P9"/>
      <text:p text:style-name="P9">I use a dictionary called ‘known_users’ that has this format:</text:p>
      <text:p text:style-name="P9">key:username, value:(ip, port, last_activity)</text:p>
      <text:p text:style-name="P9"/>
      <text:p text:style-name="P10">This dictionary behaves as a grow-only set.</text:p>
      <text:p text:style-name="P9"/>
      <text:p text:style-name="P9">Partial order: <text:span text:style-name="T4">state1 &lt;= state2, because state2 will always (by how operations on the dict are done) hold all the keys of state1 and possibly more. For each key in both state1 and state2 of the dict the last-activity entry of the tuple value in state2 will be bigger or equal to the entry in state1.</text:span></text:p>
      <text:p text:style-name="P9"/>
      <text:p text:style-name="P10">Merge: <text:span text:style-name="T5">A merge happens when the local dictionaries are broadcasted to the and received from the broadcast address (parse_broadcasts method). All the unknown keys with their values from the received state are added to the local state and all the known keys are updated if the received timestamp values are bigger than the ones currently stored in the local state. </text:span><text:span text:style-name="T6">This behavior follows these least upper bound conditions:</text:span></text:p>
      <text:p text:style-name="P10"><draw:frame draw:style-name="fr2" draw:name="Image7" text:anchor-type="char" svg:width="6.6929in" svg:height="1.2362in" draw:z-index="6"><draw:image xlink:href="Pictures/1000000100000398000000AA20251CC4A91F83EE.png" xlink:type="simple" xlink:show="embed" xlink:actuate="onLoad" draw:mime-type="image/png"/></draw:frame><text:soft-page-break/></text:p>
      <text:p text:style-name="P9"/>
      <text:p text:style-name="P12">Monotonic operations: The behavior is also monotonic like this:</text:p>
      <text:p text:style-name="P12"><draw:frame draw:style-name="fr1" draw:name="Image8" text:anchor-type="char" svg:width="6.6929in" svg:height="0.9035in" draw:z-index="7"><draw:image xlink:href="Pictures/10000001000004230000008F52701DA50AC43674.png" xlink:type="simple" xlink:show="embed" xlink:actuate="onLoad" draw:mime-type="image/png"/></draw:frame></text:p>
      <text:p text:style-name="P12">Since keys can only get added and the resulting state is the union of the previous state with the added key (keys can’t get removed).</text:p>
      <text:p text:style-name="P9"/>
      <text:p text:style-name="P9"/>
      <text:p text:style-name="P13">b) Describe how the state of your CRDT is encoded in a single UDP packet with a maximum</text:p>
      <text:p text:style-name="P13">size of 576 bytes1 and the associated limitations on the number of participants and the</text:p>
      <text:p text:style-name="P13">size of participants’ user names.</text:p>
      <text:p text:style-name="P13"/>
      <text:p text:style-name="P13">I broadcast the packets like this <text:span text:style-name="T8">(broadcast_state() method)</text:span>:</text:p>
      <text:p text:style-name="P9"><draw:frame draw:style-name="fr1" draw:name="Image9" text:anchor-type="char" svg:width="6.6929in" svg:height="0.8161in" draw:z-index="8"><draw:image xlink:href="Pictures/10000001000002C10000005698062CD7883C5678.png" xlink:type="simple" xlink:show="embed" xlink:actuate="onLoad" draw:mime-type="image/png"/></draw:frame></text:p>
      <text:p text:style-name="P13">I can assume that the value tuples each take up IPv4 address = 15 characters + port = 20 characters + time = <text:span text:style-name="T7">30 characters + whitespaces + :’s =34 characters.</text:span></text:p>
      <text:p text:style-name="P14">If we say the average username has 5 characters + 1 : and 1 whitespace = 7 characters, we can assume that each users key-value pair takes up 34+7=41 characters. Since 1 character is 1 byte in ASCII, each user sends 41 bytes. So we could send information for 576/41=14 about 14 users.</text:p>
      <text:p text:style-name="P9"/>
      <text:p text:style-name="P9"/>
      <text:p text:style-name="P15">c) Implement your utility and test with at least 2 machines to verify that all replicas are</text:p>
      <text:p text:style-name="P15">periodically consistent, i.e. they periodically show the same last recorded activity for all</text:p>
      <text:p text:style-name="P15">participants, even if one of the replicas is temporarily offline.</text:p>
      <text:p text:style-name="P15"/>
      <text:p text:style-name="P15"><draw:frame draw:style-name="fr2" draw:name="Image10" text:anchor-type="char" svg:width="6.6929in" svg:height="4.5382in" draw:z-index="9"><draw:image xlink:href="Pictures/100000010000031200000215903216386461945F.png" xlink:type="simple" xlink:show="embed" xlink:actuate="onLoad" draw:mime-type="image/png"/></draw:frame><text:soft-page-break/></text:p>
      <text:p text:style-name="P15">Jakobs view</text:p>
      <text:p text:style-name="P1"/>
      <text:p text:style-name="P1"/>
      <text:p text:style-name="P1"><draw:frame draw:style-name="fr1" draw:name="Image11" text:anchor-type="char" svg:width="6.6929in" svg:height="4.5382in" draw:z-index="10"><draw:image xlink:href="Pictures/100000010000031200000215DEEE8EDD8D268D5B.png" xlink:type="simple" xlink:show="embed" xlink:actuate="onLoad" draw:mime-type="image/png"/></draw:frame><text:soft-page-break/></text:p>
      <text:p text:style-name="P15">Roger chats a bit, then is interrupted.</text:p>
      <text:p text:style-name="P15"/>
      <text:p text:style-name="P15"><draw:frame draw:style-name="fr1" draw:name="Image12" text:anchor-type="char" svg:width="6.6929in" svg:height="4.5382in" draw:z-index="11"><draw:image xlink:href="Pictures/100000010000031200000215816F9FC3E372CA8C.png" xlink:type="simple" xlink:show="embed" xlink:actuate="onLoad" draw:mime-type="image/png"/></draw:frame></text:p>
      <text:p text:style-name="P15"><text:soft-page-break/>Roger comes online again and if you look at jakobs screen above and then rogers right here (I typed show-utility into both terminals), they display the correct last activit<text:span text:style-name="T9">y times </text:span>for both users. <text:span text:style-name="T10">Roger as seen in the middle terminal went offline between some exchanged messages.</text:span></text:p>
      <text:p text:style-name="P1"/>
      <text:p text:style-name="P1"/>
      <text:p text:style-name="P1"/>
      <text:p text:style-name="P17">Task2</text:p>
      <text:p text:style-name="P1">“”””</text:p>
      <text:p text:style-name="P1">To correctly update the vector clock, in task2, the post function from exercise 2 has to increment the vector clock (the process is that current posting user).</text:p>
      <text:p text:style-name="P1">Vector clock is implemented with dictionary</text:p>
      <text:p text:style-name="P1">“””” <text:span text:style-name="T1">(→ Deal with this block of text)</text:span></text:p>
      <text:p text:style-name="P1"/>
      <text:p text:style-name="P1"/>
      <text:p text:style-name="P1"/>
      <text:p text:style-name="P1"/>
      <text:p text:style-name="P1"/>
      <text:p text:style-name="P5">First I initialize 2 repositories Alice &amp; Bob on different machines, then I start broadcasting <text:span text:style-name="T2">(in a different terminal, since this is a running program, </text:span><text:span text:style-name="T3">note that you have to call this script out of the relevant repository like in the below screenshots</text:span><text:span text:style-name="T2">)</text:span> and then I start posting messages.</text:p>
      <text:p text:style-name="P5"/>
      <text:p text:style-name="P5"><draw:frame draw:style-name="fr3" draw:name="Image5" text:anchor-type="char" svg:width="6.6929in" svg:height="4.0071in" draw:z-index="4"><draw:image xlink:href="Pictures/1000000100000501000002FF5E9C7CF4F2E7832C.png" xlink:type="simple" xlink:show="embed" xlink:actuate="onLoad" draw:mime-type="image/png"/></draw:frame></text:p>
      <text:p text:style-name="P7">In the cat commands (in the above picture) you can see that the global_frontiers, the ‘differences_for_each’ (signifing how ahead / behind the local branches are) and the (local) vector_clock are all output correctly. Alice has 4 commits is 3 behind on Bobs ‘branch’ and the global_frontiers shows the correct ‘global’ vector_clock.</text:p>
      <text:p text:style-name="P5"/>
      <text:p text:style-name="P5"/>
      <text:p text:style-name="P5"/>
      <text:p text:style-name="P5"><draw:frame draw:style-name="fr2" draw:name="Image6" text:anchor-type="char" svg:width="6.6929in" svg:height="3.3965in" draw:z-index="5"><draw:image xlink:href="Pictures/10000001000003A8000001DBE1E34316839B6481.png" xlink:type="simple" xlink:show="embed" xlink:actuate="onLoad" draw:mime-type="image/png"/></draw:frame><text:soft-page-break/></text:p>
      <text:p text:style-name="P5"/>
      <text:p text:style-name="P5"/>
      <text:p text:style-name="P6"><draw:frame draw:style-name="fr2" draw:name="Image4" text:anchor-type="char" svg:width="6.6929in" svg:height="1.5217in" draw:z-index="3"><draw:image xlink:href="Pictures/1000000100000348000000BFB2D782B2F2AEEE07.png" xlink:type="simple" xlink:show="embed" xlink:actuate="onLoad" draw:mime-type="image/png"/></draw:frame>(This has to be done on both sides, so from Alice and Bob’s repositories)</text:p>
      <text:p text:style-name="P5"/>
      <text:p text:style-name="P18"/>
      <text:p text:style-name="P18">For the logic of the local_frontier broadcasting, the global_frontier and differences_between_users computation and the tracking of other replicas, I think its easier to look at the broadcast_vector_clock.py.</text:p>
      <text:p text:style-name="P18"/>
      <text:p text:style-name="P18"/>
      <text:p text:style-name="P20">a) Concerning how the local frontier is computed from the local message <text:span text:style-name="T12">graph: Whenever commits are created in my bash scripts (initialize.sh and post.sh from ex2) I call the vector_clock.py script (from my bash script) which updates a persistent (local) vector_clock (which is stored as dict in a .json file, the vector clock is implemented with a dict).</text:span></text:p>
      <text:p text:style-name="P19">(global_frontier and differences_between_users dicts are also stored in jsons).</text:p>
      <text:p text:style-name="P19"/>
      <text:p text:style-name="P20">Partial order: There is partial order with regards to the global_frontier that is calculated across participating users, each key in any local vector clocks is in the global_frontier vector clock and the values (messages posted counters for the different users as key:user, value:messages_posted dict) in the global_frontier vector clock are always the highest known across all the locally existing message graphs.</text:p>
      <text:p text:style-name="P20"/>
      <text:p text:style-name="P20"/>
      <text:p text:style-name="P20"/>
      <text:p text:style-name="P11"><text:soft-page-break/>Merge: <text:span text:style-name="T5">A merge happens when the local </text:span><text:span text:style-name="T13">vector_clocks</text:span><text:span text:style-name="T5"> are broadcasted to the and received from the broadcast address (parse_broadcasts method). </text:span><text:span text:style-name="T13">As in task1</text:span><text:span text:style-name="T5"> the unknown keys with their values from the received state are added to the local state and all the known keys are updated if the received timestamp values are bigger than the ones currently stored in the local state. </text:span><text:span text:style-name="T6">This behavior follows the </text:span><text:span text:style-name="T14">least upper bound conditions like in task1.</text:span></text:p>
      <text:p text:style-name="P11"/>
      <text:p text:style-name="P11"><text:span text:style-name="T14">W</text:span>hy adding a new message to the local message graph is a monotonic operation: <text:span text:style-name="T14">The counters in the global_frontier vector clock respects these conditions:</text:span></text:p>
      <text:p text:style-name="P11"/>
      <text:p text:style-name="P11"><draw:frame draw:style-name="fr1" draw:name="Image13" text:anchor-type="char" svg:width="6.6929in" svg:height="1.7819in" draw:z-index="12"><draw:image xlink:href="Pictures/1000000100000401000001110788C8AF6A2603A4.png" xlink:type="simple" xlink:show="embed" xlink:actuate="onLoad" draw:mime-type="image/png"/></draw:frame></text:p>
      <text:p text:style-name="P11"/>
      <text:p text:style-name="P21">If xi and xj are added both are smaller or equal to the result (local vector clock values through broadcast getting added to the global_frontier), since not anymore than the amount that is bigger is added (just the max is chosen) condition 3 also holds.</text:p>
      <text:p text:style-name="P21"/>
      <text:p text:style-name="P21"/>
      <text:p text:style-name="P22">b) Similar considerations as in task 1 apply, since I allow to receive 1024 bytes here I assume at least (1024/576)*14 users data could get sent here, but since the sent data is only about 7 bytes per user this could be multiplied by 41/7 too and give about 145 users who could participate. <text:span text:style-name="T15">With only 576 bytes about 82. (14*(41/7)).</text:span></text:p>
      <text:p text:style-name="P22"/>
      <text:p text:style-name="P24"><text:span text:style-name="T16">c) Code from </text:span><text:span text:style-name="T17">def</text:span><text:span text:style-name="T18"> </text:span><text:span text:style-name="T19">update_local_references</text:span><text:span text:style-name="T18">(</text:span><text:span text:style-name="T20">received_user</text:span><text:span text:style-name="T18">, </text:span><text:span text:style-name="T20">received_vector_clock</text:span><text:span text:style-name="T18">):</text:span></text:p>
      <text:p text:style-name="P23">to main method in broadcast_vector_clock.py.</text:p>
      <text:p text:style-name="P11"><text:s/></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5366" officeooo:paragraph-rsid="0013536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ternet and Distr. Progr.<text:tab/>Ex 3<text:tab/>Jakob Spies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2T20:49:51.214974518</meta:creation-date>
    <meta:editing-duration>PT1H48M29S</meta:editing-duration>
    <meta:editing-cycles>24</meta:editing-cycles>
    <meta:generator>LibreOffice/7.3.7.2$Linux_X86_64 LibreOffice_project/30$Build-2</meta:generator>
    <dc:date>2024-05-12T23:50:32.958633459</dc:date>
    <meta:document-statistic meta:table-count="0" meta:image-count="13" meta:object-count="0" meta:page-count="9" meta:paragraph-count="47" meta:word-count="1016" meta:character-count="6157" meta:non-whitespace-character-count="5186"/>
  </office:meta>
</office:document-meta>
</file>