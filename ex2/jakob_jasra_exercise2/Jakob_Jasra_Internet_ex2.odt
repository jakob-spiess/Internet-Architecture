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7000000DA2B670E74431389D8.png" manifest:media-type="image/png"/>
  <manifest:file-entry manifest:full-path="Pictures/10000001000004CB000002B748703C33DB99190C.png" manifest:media-type="image/png"/>
  <manifest:file-entry manifest:full-path="Pictures/10000001000003EA0000024B325A332ECEC44833.png" manifest:media-type="image/png"/>
  <manifest:file-entry manifest:full-path="Pictures/10000001000004B9000002DBBC5E15959F80C7B9.png" manifest:media-type="image/png"/>
  <manifest:file-entry manifest:full-path="Pictures/100000010000045F000002C91A3E9A758A8DDBB3.png" manifest:media-type="image/png"/>
  <manifest:file-entry manifest:full-path="Pictures/10000001000005D0000003A159E63C683E2A42CA.png" manifest:media-type="image/png"/>
  <manifest:file-entry manifest:full-path="Pictures/10000001000001CC000000BFD853C09AC69B80FA.png" manifest:media-type="image/png"/>
  <manifest:file-entry manifest:full-path="Pictures/1000000100000501000002C90F17825B1423CD4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a631" officeooo:paragraph-rsid="0015a631"/>
    </style:style>
    <style:style style:name="P2" style:family="paragraph" style:parent-style-name="Standard">
      <style:text-properties officeooo:rsid="00168ecb" officeooo:paragraph-rsid="00168ecb"/>
    </style:style>
    <style:style style:name="P3" style:family="paragraph" style:parent-style-name="Standard">
      <style:text-properties officeooo:rsid="0017e7a3" officeooo:paragraph-rsid="0017e7a3"/>
    </style:style>
    <style:style style:name="P4" style:family="paragraph" style:parent-style-name="Standard">
      <style:text-properties officeooo:rsid="00190278" officeooo:paragraph-rsid="00190278"/>
    </style:style>
    <style:style style:name="P5" style:family="paragraph" style:parent-style-name="Standard">
      <style:text-properties officeooo:rsid="00191fc5" officeooo:paragraph-rsid="00191fc5"/>
    </style:style>
    <style:style style:name="P6" style:family="paragraph" style:parent-style-name="Standard">
      <style:text-properties officeooo:rsid="001a3509" officeooo:paragraph-rsid="001a3509"/>
    </style:style>
    <style:style style:name="P7" style:family="paragraph" style:parent-style-name="Standard">
      <style:text-properties officeooo:rsid="0015a631" officeooo:paragraph-rsid="0015a631"/>
    </style:style>
    <style:style style:name="P8" style:family="paragraph" style:parent-style-name="Standard">
      <style:text-properties officeooo:rsid="001fe058" officeooo:paragraph-rsid="001fe058"/>
    </style:style>
    <style:style style:name="T1" style:family="text">
      <style:text-properties officeooo:rsid="0017e7a3"/>
    </style:style>
    <style:style style:name="T2" style:family="text">
      <style:text-properties officeooo:rsid="00190278"/>
    </style:style>
    <style:style style:name="T3" style:family="text">
      <style:text-properties officeooo:rsid="001e7810"/>
    </style:style>
    <style:style style:name="T4" style:family="text">
      <style:text-properties officeooo:rsid="00200025"/>
    </style:style>
    <style:style style:name="T5" style:family="text">
      <style:text-properties officeooo:rsid="002353e5"/>
    </style:style>
    <style:style style:name="T6" style:family="text">
      <style:text-properties officeooo:rsid="002584e4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The following screenshots always show the <text:span text:style-name="T4">terminal</text:span> commands run and the terminal outputs for the exercises in Tasks 1-3. <text:span text:style-name="T5">I always just run my scripts (initialize.sh, post.sh, show.sh, automate.sh) and the requested commands in the tasks.</text:span> The source code files are also in the folder <text:span text:style-name="T6">to look at</text:span> the commented source code.</text:p>
      <text:p text:style-name="P1"/>
      <text:p text:style-name="P1"/>
      <text:p text:style-name="P1">Task 1 – Initialization</text:p>
      <text:p text:style-name="P1"/>
      <text:p text:style-name="P1">1b)</text:p>
      <text:p text:style-name="P1"><draw:frame draw:style-name="fr3" draw:name="Image1" text:anchor-type="char" svg:width="6.6929in" svg:height="3.7252in" draw:z-index="0"><draw:image xlink:href="Pictures/1000000100000501000002C90F17825B1423CD4E.png" xlink:type="simple" xlink:show="embed" xlink:actuate="onLoad" draw:mime-type="image/png"/></draw:frame></text:p>
      <text:p text:style-name="P1">1c)</text:p>
      <text:p text:style-name="P1"><draw:frame draw:style-name="fr1" draw:name="Image2" text:anchor-type="char" svg:width="6.6929in" svg:height="4.1783in" draw:z-index="1"><draw:image xlink:href="Pictures/10000001000005D0000003A159E63C683E2A42CA.png" xlink:type="simple" xlink:show="embed" xlink:actuate="onLoad" draw:mime-type="image/png"/></draw:frame></text:p>
      <text:p text:style-name="P2"><text:soft-page-break/>1d)</text:p>
      <text:p text:style-name="P2">The problem is that git log only shows the commit history for the branch currently checked out (https://www.warp.dev/terminus/git-commit-history). But we now have 2 branches in this repositor<text:span text:style-name="T1">y </text:span>with HEAD pointing to Bob, so it only shows the 1 commit on <text:span text:style-name="T1">Bob’s</text:span> branch. At first I made a new commit and added Alice’s one to Bob’s one as a parent and saved this new one into .git/refs/heads/Bob, <text:span text:style-name="T1">but since ordering doesn’t have to be absolute I think this isn’t necessary. Now I just ran git log - -all to show commits across all branches:</text:span></text:p>
      <text:p text:style-name="P2"><draw:frame draw:style-name="fr3" draw:name="Image3" text:anchor-type="char" svg:width="6.6929in" svg:height="4.2646in" draw:z-index="2"><draw:image xlink:href="Pictures/100000010000045F000002C91A3E9A758A8DDBB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Task 2 – <text:span text:style-name="T2">Posting Messages</text:span></text:p>
      <text:p text:style-name="P3"><draw:frame draw:style-name="fr3" draw:name="Image4" text:anchor-type="char" svg:width="6.6929in" svg:height="4.0465in" draw:z-index="3"><draw:image xlink:href="Pictures/10000001000004B9000002DBBC5E15959F80C7B9.png" xlink:type="simple" xlink:show="embed" xlink:actuate="onLoad" draw:mime-type="image/png"/></draw:frame></text:p>
      <text:p text:style-name="P3"><draw:frame draw:style-name="fr1" draw:name="Image5" text:anchor-type="char" svg:width="6.6929in" svg:height="3.7909in" draw:z-index="4"><draw:image xlink:href="Pictures/10000001000004CB000002B748703C33DB99190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Task 3 – User Interface</text:p>
      <text:p text:style-name="P4">3b)</text:p>
      <text:p text:style-name="P1"><draw:frame draw:style-name="fr3" draw:name="Image6" text:anchor-type="char" svg:width="6.6929in" svg:height="3.9209in" draw:z-index="5"><draw:image xlink:href="Pictures/10000001000003EA0000024B325A332ECEC44833.png" xlink:type="simple" xlink:show="embed" xlink:actuate="onLoad" draw:mime-type="image/png"/></draw:frame></text:p>
      <text:p text:style-name="P1"/>
      <text:p text:style-name="P5">3c)</text:p>
      <text:p text:style-name="P5"><draw:frame draw:style-name="fr2" draw:name="Image7" text:anchor-type="char" svg:width="4.7917in" svg:height="1.9898in" draw:z-index="6"><draw:image xlink:href="Pictures/10000001000001CC000000BFD853C09AC69B80FA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8" text:anchor-type="char" svg:width="6.6929in" svg:height="2.2547in" draw:z-index="7"><draw:image xlink:href="Pictures/1000000100000287000000DA2B670E74431389D8.png" xlink:type="simple" xlink:show="embed" xlink:actuate="onLoad" draw:mime-type="image/png"/></draw:frame></text:p>
      <text:p text:style-name="P6">In the slides 56 &amp; 57 it is shown how it would look if Carol pulls Alice’s repo and then posts a message (just here the message “I am here!” instead of “Hi all”). If Carol posted the message <text:soft-page-break/>without pulling Alice’s repo, the commit with the message would only have 1 parent which is <text:span text:style-name="T3">the commit that is</text:span> Carols initial join message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4T11:55:24.945625348</meta:creation-date>
    <dc:date>2024-04-14T21:11:37.277995623</dc:date>
    <meta:editing-duration>PT16M22S</meta:editing-duration>
    <meta:editing-cycles>7</meta:editing-cycles>
    <meta:generator>LibreOffice/7.3.7.2$Linux_X86_64 LibreOffice_project/30$Build-2</meta:generator>
    <meta:document-statistic meta:table-count="0" meta:image-count="8" meta:object-count="0" meta:page-count="5" meta:paragraph-count="11" meta:word-count="224" meta:character-count="1271" meta:non-whitespace-character-count="1055"/>
  </office:meta>
</office:document-meta>
</file>