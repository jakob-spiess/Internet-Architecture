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A0000041DC167DE2590685B41.png" manifest:media-type="image/png"/>
  <manifest:file-entry manifest:full-path="Pictures/100000010000073A0000041D196645818BF566BA.png" manifest:media-type="image/png"/>
  <manifest:file-entry manifest:full-path="Pictures/100000010000073A0000041D7D610E48C0FCF6CF.png" manifest:media-type="image/png"/>
  <manifest:file-entry manifest:full-path="Pictures/100000010000073A0000041D12B89BC6C4D9C39C.png" manifest:media-type="image/png"/>
  <manifest:file-entry manifest:full-path="Pictures/100000010000073A0000041D57700F0CD9EF0645.png" manifest:media-type="image/png"/>
  <manifest:file-entry manifest:full-path="Pictures/100000010000073A0000041DBAA6C987F0E5687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d436" officeooo:paragraph-rsid="0001d436"/>
    </style:style>
    <style:style style:name="P2" style:family="paragraph" style:parent-style-name="Standard">
      <style:text-properties officeooo:rsid="00027445" officeooo:paragraph-rsid="00027445"/>
    </style:style>
    <style:style style:name="P3" style:family="paragraph" style:parent-style-name="Standard">
      <style:text-properties officeooo:rsid="00027445" officeooo:paragraph-rsid="0008f26a"/>
    </style:style>
    <style:style style:name="P4" style:family="paragraph" style:parent-style-name="Standard">
      <style:text-properties officeooo:rsid="0004432f" officeooo:paragraph-rsid="0004432f"/>
    </style:style>
    <style:style style:name="P5" style:family="paragraph" style:parent-style-name="Standard">
      <style:text-properties officeooo:rsid="0005b8a0" officeooo:paragraph-rsid="0005b8a0"/>
    </style:style>
    <style:style style:name="P6" style:family="paragraph" style:parent-style-name="Standard">
      <style:text-properties officeooo:rsid="0006655f" officeooo:paragraph-rsid="0006655f"/>
    </style:style>
    <style:style style:name="P7" style:family="paragraph" style:parent-style-name="Standard">
      <style:text-properties officeooo:rsid="0006655f" officeooo:paragraph-rsid="0006df9c"/>
    </style:style>
    <style:style style:name="P8" style:family="paragraph" style:parent-style-name="Standard">
      <style:text-properties officeooo:rsid="0006df9c" officeooo:paragraph-rsid="0006df9c"/>
    </style:style>
    <style:style style:name="P9" style:family="paragraph" style:parent-style-name="Standard">
      <style:text-properties officeooo:rsid="0006f4c2" officeooo:paragraph-rsid="0006f4c2"/>
    </style:style>
    <style:style style:name="P10" style:family="paragraph" style:parent-style-name="Standard">
      <style:text-properties officeooo:rsid="0008f26a" officeooo:paragraph-rsid="0008f26a"/>
    </style:style>
    <style:style style:name="P11" style:family="paragraph" style:parent-style-name="Standard">
      <style:text-properties officeooo:paragraph-rsid="0008f26a"/>
    </style:style>
    <style:style style:name="P12" style:family="paragraph" style:parent-style-name="Standard">
      <style:text-properties officeooo:rsid="000b41f0" officeooo:paragraph-rsid="000b41f0"/>
    </style:style>
    <style:style style:name="P13" style:family="paragraph" style:parent-style-name="Standard">
      <style:text-properties officeooo:rsid="000c2472" officeooo:paragraph-rsid="000c2472"/>
    </style:style>
    <style:style style:name="P14" style:family="paragraph" style:parent-style-name="Standard">
      <style:text-properties officeooo:rsid="00180f16" officeooo:paragraph-rsid="00180f16"/>
    </style:style>
    <style:style style:name="P15" style:family="paragraph" style:parent-style-name="Standard">
      <style:text-properties officeooo:rsid="0019734e" officeooo:paragraph-rsid="0019734e"/>
    </style:style>
    <style:style style:name="P16" style:family="paragraph" style:parent-style-name="Standard">
      <style:text-properties fo:font-weight="bold" officeooo:rsid="000c2472" officeooo:paragraph-rsid="000c2472" style:font-weight-asian="bold" style:font-weight-complex="bold"/>
    </style:style>
    <style:style style:name="P17" style:family="paragraph" style:parent-style-name="Standard">
      <style:text-properties fo:font-weight="bold" officeooo:rsid="0001d436" officeooo:paragraph-rsid="0001d436" style:font-weight-asian="bold" style:font-weight-complex="bold"/>
    </style:style>
    <style:style style:name="P18" style:family="paragraph" style:parent-style-name="Standard">
      <style:text-properties fo:font-weight="bold" officeooo:rsid="00239d05" officeooo:paragraph-rsid="00239d05" style:font-weight-asian="bold" style:font-weight-complex="bold"/>
    </style:style>
    <style:style style:name="P19" style:family="paragraph" style:parent-style-name="Text_20_body">
      <style:text-properties fo:font-weight="bold" officeooo:rsid="000cecf1" officeooo:paragraph-rsid="000cecf1" style:font-weight-asian="bold" style:font-weight-complex="bold"/>
    </style:style>
    <style:style style:name="P20" style:family="paragraph" style:parent-style-name="Standard">
      <style:text-properties officeooo:rsid="002591d0" officeooo:paragraph-rsid="002591d0"/>
    </style:style>
    <style:style style:name="P21" style:family="paragraph" style:parent-style-name="Text_20_body">
      <style:text-properties officeooo:paragraph-rsid="001183a7"/>
    </style:style>
    <style:style style:name="P22" style:family="paragraph" style:parent-style-name="Text_20_body">
      <style:text-properties officeooo:paragraph-rsid="0011e70d"/>
    </style:style>
    <style:style style:name="P23" style:family="paragraph" style:parent-style-name="Text_20_body">
      <style:text-properties officeooo:paragraph-rsid="00158d02"/>
    </style:style>
    <style:style style:name="P24" style:family="paragraph" style:parent-style-name="Standard">
      <style:text-properties fo:font-weight="bold" officeooo:rsid="0001d436" officeooo:paragraph-rsid="0001d436" style:font-weight-asian="bold" style:font-weight-complex="bold"/>
    </style:style>
    <style:style style:name="P25" style:family="paragraph" style:parent-style-name="Standard">
      <style:text-properties fo:font-weight="bold" officeooo:rsid="002c109c" officeooo:paragraph-rsid="002c109c" style:font-weight-asian="bold" style:font-weight-complex="bold"/>
    </style:style>
    <style:style style:name="P26" style:family="paragraph" style:parent-style-name="Standard">
      <style:text-properties fo:font-weight="normal" officeooo:rsid="00284d9e" officeooo:paragraph-rsid="00284d9e" style:font-weight-asian="normal" style:font-weight-complex="normal"/>
    </style:style>
    <style:style style:name="P27" style:family="paragraph" style:parent-style-name="Standard">
      <style:text-properties officeooo:rsid="000b41f0" officeooo:paragraph-rsid="000b41f0"/>
    </style:style>
    <style:style style:name="P28" style:family="paragraph" style:parent-style-name="Standard">
      <style:text-properties officeooo:rsid="002c109c" officeooo:paragraph-rsid="002c109c"/>
    </style:style>
    <style:style style:name="T1" style:family="text">
      <style:text-properties officeooo:rsid="0005b8a0"/>
    </style:style>
    <style:style style:name="T2" style:family="text">
      <style:text-properties officeooo:rsid="0008f26a"/>
    </style:style>
    <style:style style:name="T3" style:family="text">
      <style:text-properties officeooo:rsid="000c2472"/>
    </style:style>
    <style:style style:name="T4" style:family="text">
      <style:text-properties officeooo:rsid="000cecf1"/>
    </style:style>
    <style:style style:name="T5" style:family="text">
      <style:text-properties officeooo:rsid="000f9b7a"/>
    </style:style>
    <style:style style:name="T6" style:family="text">
      <style:text-properties officeooo:rsid="0011e70d"/>
    </style:style>
    <style:style style:name="T7" style:family="text">
      <style:text-properties officeooo:rsid="00138bd7"/>
    </style:style>
    <style:style style:name="T8" style:family="text">
      <style:text-properties officeooo:rsid="0014235f"/>
    </style:style>
    <style:style style:name="T9" style:family="text">
      <style:text-properties officeooo:rsid="0014969f"/>
    </style:style>
    <style:style style:name="T10" style:family="text">
      <style:text-properties officeooo:rsid="0014b709"/>
    </style:style>
    <style:style style:name="T11" style:family="text">
      <style:text-properties officeooo:rsid="00158d02"/>
    </style:style>
    <style:style style:name="T12" style:family="text">
      <style:text-properties officeooo:rsid="00170a3d"/>
    </style:style>
    <style:style style:name="T13" style:family="text">
      <style:text-properties officeooo:rsid="00191903"/>
    </style:style>
    <style:style style:name="T14" style:family="text">
      <style:text-properties officeooo:rsid="001b3870"/>
    </style:style>
    <style:style style:name="T15" style:family="text">
      <style:text-properties officeooo:rsid="001d6187"/>
    </style:style>
    <style:style style:name="T16" style:family="text">
      <style:text-properties officeooo:rsid="002138ad"/>
    </style:style>
    <style:style style:name="T17" style:family="text">
      <style:text-properties officeooo:rsid="0028df40"/>
    </style:style>
    <style:style style:name="T18" style:family="text">
      <style:text-properties officeooo:rsid="0028ea2a"/>
    </style:style>
    <style:style style:name="T19" style:family="text">
      <style:text-properties officeooo:rsid="00296e44"/>
    </style:style>
    <style:style style:name="T20" style:family="text">
      <style:text-properties officeooo:rsid="002ca8c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For the task 1 just run the tcp-chat file and provide 0/port number as arguments to start server or ip&amp;port number to connect with client.</text:p>
      <text:p text:style-name="P17"/>
      <text:p text:style-name="P17"/>
      <text:p text:style-name="P17">Task 1 Screenshots &amp; Report:</text:p>
      <text:p text:style-name="P1"/>
      <text:p text:style-name="P2">The network protocol that is used for all the packets is TCP.</text:p>
      <text:p text:style-name="P1"/>
      <text:p text:style-name="P2">1. When the connection is first established</text:p>
      <text:p text:style-name="P2">a. Packets <text:span text:style-name="T2">&amp; contents</text:span></text:p>
      <text:p text:style-name="P4">In the beginning you can see the initial handshake between the client and the server. This involves a <text:s/>three-way handshake where the client sends a SYN packet, the server responds with a SYN-ACK, and finally, the client sends an ACK. → <text:span text:style-name="T1">You can see which is sending which from the port numbers of the source b</text:span><text:span text:style-name="T11">zw.</text:span><text:span text:style-name="T1"> </text:span><text:span text:style-name="T11">d</text:span><text:span text:style-name="T1">estination ports. (Source and destination IP is localhost).</text:span></text:p>
      <text:p text:style-name="P4"/>
      <text:p text:style-name="P4">In Wireshark you can see the TCP packets with the SYN, SYN-ACK and ACK flags set accordingly, <text:span text:style-name="T1">these are the first three packets:</text:span></text:p>
      <text:p text:style-name="P4"><draw:frame draw:style-name="fr2" draw:name="Image1" text:anchor-type="char" svg:width="7.4807in" svg:height="4.2571in" draw:z-index="0"><draw:image xlink:href="Pictures/100000010000073A0000041DBAA6C987F0E5687E.png" xlink:type="simple" xlink:show="embed" xlink:actuate="onLoad" draw:mime-type="image/png"/></draw:frame></text:p>
      <text:p text:style-name="P4"/>
      <text:p text:style-name="P5">The picture is also in the .zip, I had a hard time making it readable size here.</text:p>
      <text:p text:style-name="P5"/>
      <text:p text:style-name="P2">b. Contents</text:p>
      <text:p text:style-name="P5">In the content<text:span text:style-name="T12">s pane</text:span> <text:span text:style-name="T12">of the relevant packet you can see for example which IP version is used or if the checksum of the header is calculated. You can also see the length of the frame of the packet. You can also see which flags have been set or the acknowledgment number which is used in TCP.</text:span></text:p>
      <text:p text:style-name="P5"><draw:frame draw:style-name="fr2" draw:name="Image4" text:anchor-type="char" svg:width="7.8744in" svg:height="4.8898in" draw:z-index="3"><draw:image xlink:href="Pictures/100000010000073A0000041D12B89BC6C4D9C39C.png" xlink:type="simple" xlink:show="embed" xlink:actuate="onLoad" draw:mime-type="image/png"/></draw:frame><text:soft-page-break/></text:p>
      <text:p text:style-name="P2"/>
      <text:p text:style-name="P2"/>
      <text:p text:style-name="P2"/>
      <text:p text:style-name="P2"/>
      <text:p text:style-name="P2"/>
      <text:p text:style-name="P2">2. When messages are exchanged</text:p>
      <text:p text:style-name="P2">a. Packets <text:span text:style-name="T2">&amp; contents</text:span></text:p>
      <text:p text:style-name="P6">When analyzing the packets exchanged when messages are sent between the client and the server you can see the TCP packets containing the actual text of the messages, you can see this in the screenshots provided (but better in the actual .pcapng Wireshark file in the .zip folder).</text:p>
      <text:p text:style-name="P6">The TCP packets containing the text of the messages are easily identifiable by their payload, which contains the text entered during the chat.</text:p>
      <text:p text:style-name="P6">Since Wireshark allows you to view the payload of TCP packets, it will show you the actual content of the messages exchanged.</text:p>
      <text:p text:style-name="P6"/>
      <text:p text:style-name="P7">On the bottom of the picture you can see the first message:</text:p>
      <text:p text:style-name="P6"/>
      <text:p text:style-name="P8"><draw:frame draw:style-name="fr2" draw:name="Image2" text:anchor-type="char" svg:width="7.3311in" svg:height="4.172in" draw:z-index="1"><draw:image xlink:href="Pictures/100000010000073A0000041D7D610E48C0FCF6CF.png" xlink:type="simple" xlink:show="embed" xlink:actuate="onLoad" draw:mime-type="image/png"/></draw:frame><text:soft-page-break/></text:p>
      <text:p text:style-name="P8">You can easily see all the messages in the .pcapng file</text:p>
      <text:p text:style-name="P2"/>
      <text:p text:style-name="P14"/>
      <text:p text:style-name="P14">Regarding the contents you can show which of the hex is the data and see that this is the unencrypted message as expected <text:span text:style-name="T13">in telnet</text:span>:</text:p>
      <text:p text:style-name="P14"><draw:frame draw:style-name="fr2" draw:name="Image5" text:anchor-type="char" svg:width="7.2425in" svg:height="4.1217in" draw:z-index="4"><draw:image xlink:href="Pictures/100000010000073A0000041D196645818BF566BA.png" xlink:type="simple" xlink:show="embed" xlink:actuate="onLoad" draw:mime-type="image/png"/></draw:frame></text:p>
      <text:p text:style-name="P2"/>
      <text:p text:style-name="P2"/>
      <text:p text:style-name="P2"><text:soft-page-break/>3. When the connection is terminated</text:p>
      <text:p text:style-name="P2">a. Packets <text:span text:style-name="T2">&amp; contents</text:span></text:p>
      <text:p text:style-name="P9">When the connection is terminated you can see the involved TCP FIN packet sent by, in my case, the server (flag: FIN, ACK) to indicate the intention to close the connection, followed by and acknowledgment (flag: FIN, ACK) from the other party (the terminal using telnet). Finally the server sends the last acknowledgment (flag: ACK).</text:p>
      <text:p text:style-name="P9"/>
      <text:p text:style-name="P10">In Wireshark you can see on the bottom the last three packets with the fags and ports:</text:p>
      <text:p text:style-name="P3"/>
      <text:p text:style-name="P11"><draw:frame draw:style-name="fr2" draw:name="Image3" text:anchor-type="char" svg:width="7.1492in" svg:height="4.0689in" draw:z-index="2"><draw:image xlink:href="Pictures/100000010000073A0000041D57700F0CD9EF0645.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Regarding the contents you could also look at the set TCP flags in the content pane:</text:p>
      <text:p text:style-name="P15"/>
      <text:p text:style-name="P15"><draw:frame draw:style-name="fr1" draw:name="Image6" text:anchor-type="char" svg:width="6.6929in" svg:height="3.8091in" draw:z-index="5"><draw:image xlink:href="Pictures/100000010000073A0000041DC167DE2590685B41.png" xlink:type="simple" xlink:show="embed" xlink:actuate="onLoad" draw:mime-type="image/png"/></draw:frame></text:p>
      <text:p text:style-name="P12"/>
      <text:p text:style-name="P12"/>
      <text:p text:style-name="P12"/>
      <text:p text:style-name="P18">Task 2:</text:p>
      <text:p text:style-name="P12"/>
      <text:p text:style-name="P20">Once you run the script for the first time you have to start <text:span text:style-name="T18">a</text:span> rendez-vous server <text:span text:style-name="T17">by typing server.</text:span></text:p>
      <text:p text:style-name="P20">If you start a client <text:span text:style-name="T19">by typing client after running the script</text:span> you have to give the name of the rendez-vous server and choose a nickname.</text:p>
      <text:p text:style-name="P12"/>
      <text:p text:style-name="P15">In my implementation both clients have to request each others nickname from the rendez-vous server in order to chat with each other.</text:p>
      <text:p text:style-name="P12"/>
      <text:p text:style-name="P12"/>
      <text:p text:style-name="P25">Task 3:</text:p>
      <text:p text:style-name="P28"/>
      <text:p text:style-name="P28">Just run the file and choose a nickname and you <text:span text:style-name="T20">will receive all the messages</text:span> <text:span text:style-name="T20">from</text:span> everybody else that has run the file and chose a nickname <text:span text:style-name="T20">as well as being able to send messages to all these people too.</text:span></text:p>
      <text:p text:style-name="P12"/>
      <text:p text:style-name="P12"/>
      <text:p text:style-name="P12"/>
      <text:p text:style-name="P16">Task 3 Question:</text:p>
      <text:p text:style-name="P13"/>
      <text:p text:style-name="P21"><text:span text:style-name="T3">To implement a feature for displaying a current list of all the other participants in the network </text:span><text:span text:style-name="T15">in this decentralized chat the following would be implementation options:</text:span></text:p>
      <text:p text:style-name="P22"><text:span text:style-name="Strong_20_Emphasis">Participant</text:span><text:span text:style-name="Strong_20_Emphasis"><text:span text:style-name="T14">s Finding</text:span></text:span><text:span text:style-name="Strong_20_Emphasis"> <text:s/>Protocol</text:span>: Implement a protocol where clients periodically broadcast a "hello" message containing their nickname to the broadcast address. Other clients listen for these messages and maintain a list of active participants <text:span text:style-name="T7">themselves.</text:span></text:p>
      <text:p text:style-name="P22"><text:soft-page-break/><text:span text:style-name="Strong_20_Emphasis">Heartbeat Messages</text:span>: <text:span text:style-name="T8">In order to keep the list up to date apart from explicitly leaving clients, c</text:span>lients can periodically broadcast "heartbeat" messages to indicate their presence in the network. If a client stops receiving heartbeat messages from a participant for a certain duration, it assumes that the participant has left the network <text:span text:style-name="T8">or disconnected.</text:span></text:p>
      <text:p text:style-name="P22"><text:span text:style-name="Strong_20_Emphasis">Joining Clients</text:span>: When a new client joins the network, it broadcasts a "hello" message <text:span text:style-name="T8">(compliant with the protocol that one made up)</text:span>. Existing clients receive this message and add the new participant to their list.</text:p>
      <text:p text:style-name="P22"><text:span text:style-name="Strong_20_Emphasis">Leaving Clients</text:span>: When a client wishes to leave the network, it broadcasts a "goodbye" message. Other clients receiving this message remove the departing participant from their list.</text:p>
      <text:p text:style-name="P22"><text:span text:style-name="Strong_20_Emphasis">Participant List Exchange</text:span>: Optionally, <text:span text:style-name="T9">one could</text:span> implement a mechanism where clients periodically exchange their participant lists. This can help in case a client misses some "hello" or "goodbye" messages due to network issues.</text:p>
      <text:p text:style-name="Text_20_body">These functionalities would be implemented at the application layer of the network model (the highest layer). Clients would manage the participant list locally, and communication regarding joining/leaving participants would occur directly between clients through broadcast messages.</text:p>
      <text:p text:style-name="Text_20_body"/>
      <text:p text:style-name="P22">Potential downsides <text:span text:style-name="T6">of a decentralized model:</text:span></text:p>
      <text:p text:style-name="P22"><text:span text:style-name="Strong_20_Emphasis">Network Congestion</text:span>: Frequent broadcasting of messages for participant discovery and heartbeats could lead to network congestion, especially in larger networks.</text:p>
      <text:p text:style-name="P22"><text:span text:style-name="Strong_20_Emphasis">Scalability</text:span>: As the number of participants increases, managing the participant list and handling frequent broadcasts could become more complex and resource-intensive.</text:p>
      <text:p text:style-name="P22"><text:span text:style-name="Strong_20_Emphasis">Reliability</text:span>: Broadcasting messages may not always guarantee delivery, especially in large or congested networks. Some participants might miss messages, leading to inconsistencies in the participant list. <text:span text:style-name="T16">Resolving these inconsistencies I imagine to be harder than with a server.</text:span></text:p>
      <text:p text:style-name="P22"><text:span text:style-name="Strong_20_Emphasis">Security</text:span>: Without a central server, it may be more challenging to implement security measures such as authentication and encryption. <text:span text:style-name="T9">For example one could log out another user with the leaving protocol and the log in as that user, stopping that I think may be harder in a decentralized that in a centralized model.</text:span></text:p>
      <text:p text:style-name="P22"/>
      <text:p text:style-name="Text_20_body"/>
      <text:p text:style-name="P19">Task 4 <text:span text:style-name="T5">Question</text:span>:</text:p>
      <text:p text:style-name="P23"><text:span text:style-name="T5">T</text:span><text:span text:style-name="T4">he main difference in the content of relevant packets </text:span><text:span text:style-name="T11">from task 1 </text:span><text:span text:style-name="T4">compared to accessing an HTTPS website (HTTPS/TCP) would be </text:span><text:span text:style-name="T10">that the contents of the packets are encrypted. Apparently, HTTPS/TCP communication involves encryption using SSL/TLS, making the payload of the packets unreadable without decryption key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4T10:39:44.477703499</meta:creation-date>
    <dc:date>2024-03-24T22:21:01.805674325</dc:date>
    <meta:editing-duration>PT3H49M47S</meta:editing-duration>
    <meta:editing-cycles>29</meta:editing-cycles>
    <meta:generator>LibreOffice/7.3.7.2$Linux_X86_64 LibreOffice_project/30$Build-2</meta:generator>
    <meta:document-statistic meta:table-count="0" meta:image-count="6" meta:object-count="0" meta:page-count="6" meta:paragraph-count="44" meta:word-count="1011" meta:character-count="6155" meta:non-whitespace-character-count="5186"/>
  </office:meta>
</office:document-meta>
</file>